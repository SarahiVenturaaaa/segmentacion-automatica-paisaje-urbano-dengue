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Mona Sans VF" svg:font-family="'Mona Sans VF', apple-system, BlinkMacSystemFont, 'Segoe UI', 'Noto Sans', Helvetica, Arial, sans-serif, 'Apple Color Emoji', 'Segoe UI Emoji'"/>
    <style:font-face style:name="system-ui" svg:font-family="system-ui, apple-system, blinkmacsystemfont,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12pt" style:font-size-asian="12pt" style:font-size-complex="12pt"/>
    </style:style>
    <style:style style:name="P2" style:family="paragraph" style:parent-style-name="Heading_20_2">
      <style:text-properties officeooo:paragraph-rsid="00264afa"/>
    </style:style>
    <style:style style:name="P3" style:family="paragraph" style:parent-style-name="Heading_20_2">
      <style:text-properties officeooo:paragraph-rsid="001f6c73" fo:background-color="#ffff00"/>
    </style:style>
    <style:style style:name="P4" style:family="paragraph" style:parent-style-name="Heading_20_2">
      <style:text-properties officeooo:paragraph-rsid="001b6a4e" fo:background-color="#ffff00"/>
    </style:style>
    <style:style style:name="P5" style:family="paragraph" style:parent-style-name="Heading_20_3">
      <style:text-properties fo:font-size="12pt" style:font-size-asian="12pt" style:font-size-complex="12pt"/>
    </style:style>
    <style:style style:name="P6" style:family="paragraph" style:parent-style-name="Heading_20_3">
      <style:text-properties fo:font-size="12pt" officeooo:paragraph-rsid="0020f9a7" style:font-size-asian="12pt" style:font-size-complex="12pt"/>
    </style:style>
    <style:style style:name="P7" style:family="paragraph" style:parent-style-name="Heading_20_3">
      <style:text-properties fo:font-size="12pt" fo:background-color="#ffff00" style:font-size-asian="12pt" style:font-size-complex="12pt"/>
    </style:style>
    <style:style style:name="P8" style:family="paragraph" style:parent-style-name="Heading_20_3">
      <style:text-properties officeooo:paragraph-rsid="0020f9a7"/>
    </style:style>
    <style:style style:name="P9" style:family="paragraph" style:parent-style-name="Horizontal_20_Line">
      <style:text-properties fo:font-size="12pt" style:font-size-asian="12pt" style:font-size-complex="12pt"/>
    </style:style>
    <style:style style:name="P10" style:family="paragraph" style:parent-style-name="Horizontal_20_Line">
      <style:text-properties fo:font-size="12pt" officeooo:paragraph-rsid="001bc4cc" style:font-size-asian="12pt" style:font-size-complex="12pt"/>
    </style:style>
    <style:style style:name="P11" style:family="paragraph" style:parent-style-name="Horizontal_20_Line">
      <style:text-properties fo:font-size="12pt" officeooo:paragraph-rsid="001f6c73" style:font-size-asian="12pt" style:font-size-complex="12pt"/>
    </style:style>
    <style:style style:name="P12" style:family="paragraph" style:parent-style-name="Horizontal_20_Line">
      <style:text-properties officeooo:paragraph-rsid="0024edca"/>
    </style:style>
    <style:style style:name="P13" style:family="paragraph" style:parent-style-name="Preformatted_20_Text">
      <style:paragraph-properties fo:margin-top="0cm" fo:margin-bottom="0.499cm" loext:contextual-spacing="false"/>
    </style:style>
    <style:style style:name="P14" style:family="paragraph" style:parent-style-name="Standard">
      <style:paragraph-properties style:line-height-at-least="0.503cm"/>
      <style:text-properties fo:color="#000000" style:font-name="Droid Sans Mono" fo:font-size="10.5pt" fo:font-weight="normal" officeooo:rsid="003a4408" officeooo:paragraph-rsid="001f6c73" fo:background-color="transparent" style:font-weight-asian="normal" style:font-weight-complex="normal"/>
    </style:style>
    <style:style style:name="P15" style:family="paragraph" style:parent-style-name="Standard">
      <style:paragraph-properties style:line-height-at-least="0.503cm"/>
      <style:text-properties fo:color="#000000" style:font-name="Liberation Serif" fo:font-size="12pt" fo:font-weight="bold" officeooo:rsid="00444888" officeooo:paragraph-rsid="001f6c73" fo:background-color="transparent" style:font-size-asian="12pt" style:font-weight-asian="bold" style:font-size-complex="12pt" style:font-weight-complex="bold"/>
    </style:style>
    <style:style style:name="P16" style:family="paragraph" style:parent-style-name="Text_20_body">
      <style:text-properties officeooo:paragraph-rsid="00181904"/>
    </style:style>
    <style:style style:name="P17" style:family="paragraph" style:parent-style-name="Text_20_body">
      <style:text-properties officeooo:paragraph-rsid="0020f9a7"/>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officeooo:rsid="001c1d82" officeooo:paragraph-rsid="001c1d82" style:font-size-asian="12pt" style:font-size-complex="12pt"/>
    </style:style>
    <style:style style:name="P20" style:family="paragraph" style:parent-style-name="Text_20_body">
      <style:text-properties fo:font-size="12pt" officeooo:paragraph-rsid="0020f9a7" style:font-size-asian="12pt" style:font-size-complex="12pt"/>
    </style:style>
    <style:style style:name="P21" style:family="paragraph" style:parent-style-name="Text_20_body">
      <style:text-properties fo:font-size="12pt" officeooo:paragraph-rsid="0026d484" style:font-size-asian="12pt" style:font-size-complex="12pt"/>
    </style:style>
    <style:style style:name="P22" style:family="paragraph" style:parent-style-name="Text_20_body">
      <style:text-properties officeooo:paragraph-rsid="00196319"/>
    </style:style>
    <style:style style:name="P23" style:family="paragraph" style:parent-style-name="Text_20_body">
      <style:text-properties officeooo:paragraph-rsid="001b6a4e"/>
    </style:style>
    <style:style style:name="P24" style:family="paragraph" style:parent-style-name="Text_20_body">
      <style:text-properties officeooo:rsid="001bc4cc" officeooo:paragraph-rsid="001bc4cc"/>
    </style:style>
    <style:style style:name="P25" style:family="paragraph" style:parent-style-name="Text_20_body">
      <style:text-properties officeooo:paragraph-rsid="001c1d82"/>
    </style:style>
    <style:style style:name="P26" style:family="paragraph" style:parent-style-name="Text_20_body">
      <style:text-properties officeooo:rsid="0020f9a7" officeooo:paragraph-rsid="00217818"/>
    </style:style>
    <style:style style:name="P27" style:family="paragraph" style:parent-style-name="Text_20_body">
      <style:text-properties officeooo:paragraph-rsid="0024edca"/>
    </style:style>
    <style:style style:name="P28" style:family="paragraph" style:parent-style-name="Text_20_body">
      <style:text-properties style:font-name="Liberation Serif" officeooo:paragraph-rsid="0024edca"/>
    </style:style>
    <style:style style:name="P29" style:family="paragraph" style:parent-style-name="Text_20_body">
      <style:paragraph-properties fo:margin-top="0cm" fo:margin-bottom="0cm" loext:contextual-spacing="false"/>
      <style:text-properties officeooo:paragraph-rsid="001bc4cc"/>
    </style:style>
    <style:style style:name="P30" style:family="paragraph" style:parent-style-name="Heading_20_2">
      <style:text-properties fo:font-size="12pt" officeooo:paragraph-rsid="002a49a0"/>
    </style:style>
    <style:style style:name="P31" style:family="paragraph" style:parent-style-name="Heading_20_2">
      <style:text-properties fo:font-size="12pt" officeooo:paragraph-rsid="002d173d"/>
    </style:style>
    <style:style style:name="P32" style:family="paragraph" style:parent-style-name="Heading_20_2">
      <style:text-properties officeooo:paragraph-rsid="003bc416"/>
    </style:style>
    <style:style style:name="P33" style:family="paragraph" style:parent-style-name="Heading_20_3">
      <style:text-properties fo:font-size="12pt" style:font-size-asian="12pt" style:font-size-complex="12pt"/>
    </style:style>
    <style:style style:name="P34" style:family="paragraph" style:parent-style-name="Horizontal_20_Line">
      <style:text-properties fo:color="#bbbebf" style:font-name="Droid Sans Mono" fo:font-size="10.5pt" fo:font-weight="normal" officeooo:rsid="0020f9a7" officeooo:paragraph-rsid="002d173d" fo:background-color="transparent"/>
    </style:style>
    <style:style style:name="P35" style:family="paragraph" style:parent-style-name="Horizontal_20_Line">
      <style:text-properties fo:color="#bbbebf" style:font-name="Droid Sans Mono" fo:font-size="10.5pt" fo:font-weight="normal" officeooo:rsid="0020f9a7" officeooo:paragraph-rsid="003bc416" fo:background-color="transparent"/>
    </style:style>
    <style:style style:name="P36" style:family="paragraph" style:parent-style-name="Horizontal_20_Line">
      <style:text-properties fo:font-size="12pt" officeooo:paragraph-rsid="002a49a0" style:font-size-asian="12pt" style:font-size-complex="12pt"/>
    </style:style>
    <style:style style:name="P37" style:family="paragraph" style:parent-style-name="Preformatted_20_Text">
      <style:paragraph-properties fo:margin-top="0cm" fo:margin-bottom="0.499cm" loext:contextual-spacing="false"/>
    </style:style>
    <style:style style:name="P38" style:family="paragraph" style:parent-style-name="Standard" style:list-style-name="L11">
      <style:paragraph-properties style:line-height-at-least="0.503cm"/>
      <style:text-properties fo:color="#000000" style:font-name="Liberation Mono" fo:font-size="9pt" fo:font-weight="normal" officeooo:rsid="003a4408" officeooo:paragraph-rsid="001f6c73" fo:background-color="transparent" style:font-size-asian="9pt" style:font-weight-asian="normal" style:font-size-complex="9pt" style:font-weight-complex="normal"/>
    </style:style>
    <style:style style:name="P39" style:family="paragraph" style:parent-style-name="Standard" style:list-style-name="L11">
      <style:paragraph-properties style:line-height-at-least="0.503cm"/>
      <style:text-properties fo:color="#000000" style:font-name="Liberation Mono" fo:font-size="9pt" fo:font-weight="normal" officeooo:rsid="003a4408" officeooo:paragraph-rsid="0022fbb4" fo:background-color="transparent" style:font-size-asian="9pt" style:font-weight-asian="normal" style:font-size-complex="9pt" style:font-weight-complex="normal"/>
    </style:style>
    <style:style style:name="P40" style:family="paragraph" style:parent-style-name="Standard" style:list-style-name="L11">
      <style:paragraph-properties style:line-height-at-least="0.503cm"/>
      <style:text-properties fo:color="#000000" style:font-name="Liberation Mono" fo:font-size="9pt" fo:font-weight="normal" officeooo:rsid="003a4408" officeooo:paragraph-rsid="0022fbb4" fo:background-color="transparent" style:font-weight-asian="normal" style:font-weight-complex="normal"/>
    </style:style>
    <style:style style:name="P41" style:family="paragraph" style:parent-style-name="Standard">
      <style:paragraph-properties style:line-height-at-least="0.503cm"/>
      <style:text-properties officeooo:paragraph-rsid="00211669"/>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4">
      <style:text-properties officeooo:paragraph-rsid="0020f9a7"/>
    </style:style>
    <style:style style:name="P47" style:family="paragraph" style:parent-style-name="Text_20_body">
      <style:text-properties fo:font-size="12pt" style:font-size-asian="12pt" style:font-size-complex="12pt"/>
    </style:style>
    <style:style style:name="P48" style:family="paragraph" style:parent-style-name="Text_20_body" style:list-style-name="L5">
      <style:text-properties fo:font-size="12pt" style:font-size-asian="12pt" style:font-size-complex="12pt"/>
    </style:style>
    <style:style style:name="P49" style:family="paragraph" style:parent-style-name="Text_20_body">
      <style:text-properties fo:font-size="12pt" officeooo:paragraph-rsid="003d69a8" style:font-size-asian="12pt" style:font-size-complex="12pt"/>
    </style:style>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text-properties officeooo:paragraph-rsid="00167245"/>
    </style:style>
    <style:style style:name="P54" style:family="paragraph" style:parent-style-name="Text_20_body" style:list-style-name="L10"/>
    <style:style style:name="P55" style:family="paragraph" style:parent-style-name="Text_20_body" style:list-style-name="L13">
      <style:text-properties officeooo:paragraph-rsid="0020f9a7"/>
    </style:style>
    <style:style style:name="P56" style:family="paragraph" style:parent-style-name="Text_20_body" style:list-style-name="L14">
      <style:text-properties officeooo:paragraph-rsid="0020f9a7"/>
    </style:style>
    <style:style style:name="P57" style:family="paragraph" style:parent-style-name="Text_20_body" style:list-style-name="L15">
      <style:text-properties style:font-name="Liberation Serif" officeooo:paragraph-rsid="0024edca"/>
    </style:style>
    <style:style style:name="P58" style:family="paragraph" style:parent-style-name="Text_20_body">
      <style:text-properties style:font-name="Liberation Serif" officeooo:paragraph-rsid="003d69a8"/>
    </style:style>
    <style:style style:name="P59" style:family="paragraph" style:parent-style-name="Text_20_body" style:list-style-name="L16">
      <style:text-properties officeooo:paragraph-rsid="0024edca"/>
    </style:style>
    <style:style style:name="P60" style:family="paragraph" style:parent-style-name="Text_20_body" style:list-style-name="L17"/>
    <style:style style:name="P61" style:family="paragraph" style:parent-style-name="Text_20_body" style:list-style-name="L17">
      <style:text-properties officeooo:paragraph-rsid="002a49a0"/>
    </style:style>
    <style:style style:name="P62" style:family="paragraph" style:parent-style-name="Text_20_body" style:list-style-name="L18"/>
    <style:style style:name="P63" style:family="paragraph" style:parent-style-name="Text_20_body" style:list-style-name="L19">
      <style:text-properties officeooo:paragraph-rsid="003d69a8"/>
    </style:style>
    <style:style style:name="P64" style:family="paragraph" style:parent-style-name="Text_20_body" style:list-style-name="L20">
      <style:text-properties officeooo:paragraph-rsid="0026d484"/>
    </style:style>
    <style:style style:name="P65" style:family="paragraph" style:parent-style-name="Text_20_body" style:list-style-name="L21"/>
    <style:style style:name="P66" style:family="paragraph" style:parent-style-name="Text_20_body">
      <style:text-properties fo:color="#bbbebf" style:font-name="Droid Sans Mono" fo:font-size="10.5pt" fo:font-weight="normal" officeooo:rsid="0020f9a7" officeooo:paragraph-rsid="002a49a0" fo:background-color="transparent"/>
    </style:style>
    <style:style style:name="P67" style:family="paragraph" style:parent-style-name="Text_20_body">
      <style:text-properties officeooo:paragraph-rsid="002a49a0"/>
    </style:style>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text-properties officeooo:paragraph-rsid="00360128"/>
    </style:style>
    <style:style style:name="P72" style:family="paragraph" style:parent-style-name="Text_20_body" style:list-style-name="L32">
      <style:text-properties officeooo:paragraph-rsid="00360128"/>
    </style:style>
    <style:style style:name="P73" style:family="paragraph" style:parent-style-name="Text_20_body" style:list-style-name="L32">
      <style:text-properties fo:font-size="10pt" fo:font-weight="bold" officeooo:rsid="00360128" officeooo:paragraph-rsid="00360128" style:font-size-asian="8.75pt" style:font-weight-asian="bold" style:font-size-complex="10pt" style:font-weight-complex="bold"/>
    </style:style>
    <style:style style:name="P74" style:family="paragraph" style:parent-style-name="Text_20_body">
      <style:text-properties officeooo:paragraph-rsid="00379b55"/>
    </style:style>
    <style:style style:name="P75" style:family="paragraph" style:parent-style-name="Text_20_body" style:list-style-name="L34">
      <style:text-properties officeooo:paragraph-rsid="00379b55"/>
    </style:style>
    <style:style style:name="P76" style:family="paragraph" style:parent-style-name="Text_20_body" style:list-style-name="L36">
      <style:text-properties officeooo:paragraph-rsid="00379b55"/>
    </style:style>
    <style:style style:name="P77" style:family="paragraph" style:parent-style-name="Text_20_body" style:list-style-name="L37">
      <style:text-properties officeooo:paragraph-rsid="00379b55"/>
    </style:style>
    <style:style style:name="P78" style:family="paragraph" style:parent-style-name="Text_20_body">
      <style:text-properties fo:font-weight="bold" style:font-weight-asian="bold" style:font-weight-complex="bold"/>
    </style:style>
    <style:style style:name="P79" style:family="paragraph" style:parent-style-name="Text_20_body" style:list-style-name="L37">
      <style:text-properties fo:font-weight="bold" officeooo:paragraph-rsid="00379b55" style:font-weight-asian="bold" style:font-weight-complex="bold"/>
    </style:style>
    <style:style style:name="P80" style:family="paragraph" style:parent-style-name="Text_20_body" style:list-style-name="L39">
      <style:text-properties officeooo:paragraph-rsid="00398c4b"/>
    </style:style>
    <style:style style:name="P81" style:family="paragraph" style:parent-style-name="Text_20_body" style:list-style-name="L39">
      <style:text-properties officeooo:paragraph-rsid="003d69a8"/>
    </style:style>
    <style:style style:name="P82" style:family="paragraph" style:parent-style-name="Text_20_body">
      <style:text-properties officeooo:paragraph-rsid="00398c4b"/>
    </style:style>
    <style:style style:name="P83" style:family="paragraph" style:parent-style-name="Text_20_body" style:list-style-name="L40">
      <style:text-properties officeooo:paragraph-rsid="00398c4b"/>
    </style:style>
    <style:style style:name="P84" style:family="paragraph" style:parent-style-name="Text_20_body" style:list-style-name="L40">
      <style:text-properties officeooo:paragraph-rsid="003d69a8"/>
    </style:style>
    <style:style style:name="P85" style:family="paragraph" style:parent-style-name="Text_20_body" style:list-style-name="L41">
      <style:text-properties officeooo:paragraph-rsid="00398c4b"/>
    </style:style>
    <style:style style:name="P86" style:family="paragraph" style:parent-style-name="Text_20_body" style:list-style-name="L42">
      <style:text-properties officeooo:paragraph-rsid="00398c4b"/>
    </style:style>
    <style:style style:name="P87" style:family="paragraph" style:parent-style-name="Text_20_body" style:list-style-name="L43"/>
    <style:style style:name="P88" style:family="paragraph" style:parent-style-name="Text_20_body">
      <style:text-properties officeooo:paragraph-rsid="0024edca"/>
    </style:style>
    <style:style style:name="P89" style:family="paragraph" style:parent-style-name="Text_20_body">
      <style:text-properties officeooo:paragraph-rsid="0039d90a"/>
    </style:style>
    <style:style style:name="P90" style:family="paragraph" style:parent-style-name="Text_20_body" style:list-style-name="L45">
      <style:text-properties officeooo:paragraph-rsid="003bc416"/>
    </style:style>
    <style:style style:name="P91" style:family="paragraph" style:parent-style-name="Text_20_body">
      <style:text-properties officeooo:paragraph-rsid="003d69a8"/>
    </style:style>
    <style:style style:name="P92" style:family="paragraph" style:parent-style-name="Text_20_body" style:list-style-name="L46">
      <style:text-properties officeooo:paragraph-rsid="003d69a8"/>
    </style:style>
    <style:style style:name="P93" style:family="paragraph" style:parent-style-name="Text_20_body" style:list-style-name="L47">
      <style:text-properties officeooo:paragraph-rsid="003d69a8"/>
    </style:style>
    <style:style style:name="P94" style:family="paragraph" style:parent-style-name="Text_20_body" style:list-style-name="L1">
      <style:paragraph-properties fo:margin-top="0cm" fo:margin-bottom="0cm" loext:contextual-spacing="false"/>
    </style:style>
    <style:style style:name="P95" style:family="paragraph" style:parent-style-name="Text_20_body" style:list-style-name="L2">
      <style:paragraph-properties fo:margin-top="0cm" fo:margin-bottom="0cm" loext:contextual-spacing="false"/>
    </style:style>
    <style:style style:name="P96" style:family="paragraph" style:parent-style-name="Text_20_body" style:list-style-name="L2">
      <style:paragraph-properties fo:margin-top="0cm" fo:margin-bottom="0cm" loext:contextual-spacing="false"/>
      <style:text-properties fo:font-size="12pt" style:font-size-asian="12pt" style:font-size-complex="12pt"/>
    </style:style>
    <style:style style:name="P97" style:family="paragraph" style:parent-style-name="Text_20_body" style:list-style-name="L5">
      <style:paragraph-properties fo:margin-top="0cm" fo:margin-bottom="0cm" loext:contextual-spacing="false"/>
      <style:text-properties fo:font-size="12pt" style:font-size-asian="12pt" style:font-size-complex="12pt"/>
    </style:style>
    <style:style style:name="P98" style:family="paragraph" style:parent-style-name="Text_20_body" style:list-style-name="L12">
      <style:paragraph-properties fo:margin-top="0cm" fo:margin-bottom="0cm" loext:contextual-spacing="false"/>
      <style:text-properties fo:font-size="12pt" officeooo:paragraph-rsid="0020f9a7" style:font-size-asian="12pt" style:font-size-complex="12pt"/>
    </style:style>
    <style:style style:name="P99" style:family="paragraph" style:parent-style-name="Text_20_body" style:list-style-name="L3">
      <style:paragraph-properties fo:margin-top="0cm" fo:margin-bottom="0cm" loext:contextual-spacing="false"/>
    </style:style>
    <style:style style:name="P100" style:family="paragraph" style:parent-style-name="Text_20_body" style:list-style-name="L3">
      <style:paragraph-properties fo:margin-top="0cm" fo:margin-bottom="0cm" loext:contextual-spacing="false"/>
      <style:text-properties officeooo:paragraph-rsid="001bc4cc"/>
    </style:style>
    <style:style style:name="P101" style:family="paragraph" style:parent-style-name="Text_20_body" style:list-style-name="L5">
      <style:paragraph-properties fo:margin-top="0cm" fo:margin-bottom="0cm" loext:contextual-spacing="false"/>
      <style:text-properties officeooo:paragraph-rsid="00196319"/>
    </style:style>
    <style:style style:name="P102" style:family="paragraph" style:parent-style-name="Text_20_body" style:list-style-name="L7">
      <style:paragraph-properties fo:margin-top="0cm" fo:margin-bottom="0cm" loext:contextual-spacing="false"/>
    </style:style>
    <style:style style:name="P103" style:family="paragraph" style:parent-style-name="Text_20_body" style:list-style-name="L8">
      <style:paragraph-properties fo:margin-top="0cm" fo:margin-bottom="0cm" loext:contextual-spacing="false"/>
    </style:style>
    <style:style style:name="P104" style:family="paragraph" style:parent-style-name="Text_20_body" style:list-style-name="L10">
      <style:paragraph-properties fo:margin-top="0cm" fo:margin-bottom="0cm" loext:contextual-spacing="false"/>
    </style:style>
    <style:style style:name="P105" style:family="paragraph" style:parent-style-name="Text_20_body" style:list-style-name="L12">
      <style:paragraph-properties fo:margin-top="0cm" fo:margin-bottom="0cm" loext:contextual-spacing="false"/>
      <style:text-properties officeooo:paragraph-rsid="0020f9a7"/>
    </style:style>
    <style:style style:name="P106" style:family="paragraph" style:parent-style-name="Text_20_body" style:list-style-name="L15">
      <style:paragraph-properties fo:margin-top="0cm" fo:margin-bottom="0cm" loext:contextual-spacing="false"/>
      <style:text-properties officeooo:paragraph-rsid="0024edca"/>
    </style:style>
    <style:style style:name="P107" style:family="paragraph" style:parent-style-name="Text_20_body" style:list-style-name="L16">
      <style:paragraph-properties fo:margin-top="0cm" fo:margin-bottom="0cm" loext:contextual-spacing="false"/>
      <style:text-properties style:font-name="Liberation Serif" officeooo:paragraph-rsid="0024edca"/>
    </style:style>
    <style:style style:name="P108" style:family="paragraph" style:parent-style-name="Text_20_body" style:list-style-name="L16">
      <style:paragraph-properties fo:margin-top="0cm" fo:margin-bottom="0cm" loext:contextual-spacing="false"/>
      <style:text-properties officeooo:paragraph-rsid="0024edca"/>
    </style:style>
    <style:style style:name="P109" style:family="paragraph" style:parent-style-name="Text_20_body" style:list-style-name="L20">
      <style:paragraph-properties fo:margin-top="0cm" fo:margin-bottom="0cm" loext:contextual-spacing="false"/>
    </style:style>
    <style:style style:name="P110" style:family="paragraph" style:parent-style-name="Text_20_body" style:list-style-name="L25">
      <style:paragraph-properties fo:margin-top="0cm" fo:margin-bottom="0cm" loext:contextual-spacing="false"/>
    </style:style>
    <style:style style:name="T1" style:family="text">
      <style:text-properties fo:font-size="12pt" style:font-size-asian="12pt" style:font-size-complex="12pt"/>
    </style:style>
    <style:style style:name="T2" style:family="text">
      <style:text-properties fo:font-size="12pt" officeooo:rsid="00167245" style:font-size-asian="12pt" style:font-size-complex="12pt"/>
    </style:style>
    <style:style style:name="T3" style:family="text">
      <style:text-properties fo:font-size="12pt" officeooo:rsid="00181904" style:font-size-asian="12pt" style:font-size-complex="12pt"/>
    </style:style>
    <style:style style:name="T4" style:family="text">
      <style:text-properties fo:font-size="12pt" officeooo:rsid="00196319" style:font-size-asian="12pt" style:font-size-complex="12pt"/>
    </style:style>
    <style:style style:name="T5" style:family="text">
      <style:text-properties fo:font-size="12pt" officeooo:rsid="001b6a4e" style:font-size-asian="12pt" style:font-size-complex="12pt"/>
    </style:style>
    <style:style style:name="T6" style:family="text">
      <style:text-properties fo:font-size="12pt" officeooo:rsid="001bc4cc" style:font-size-asian="12pt" style:font-size-complex="12pt"/>
    </style:style>
    <style:style style:name="T7" style:family="text">
      <style:text-properties fo:font-size="12pt" officeooo:rsid="001f6c73" style:font-size-asian="12pt" style:font-size-complex="12pt"/>
    </style:style>
    <style:style style:name="T8" style:family="text">
      <style:text-properties fo:font-size="12pt" officeooo:rsid="0020f9a7" style:font-size-asian="12pt" style:font-size-complex="12pt"/>
    </style:style>
    <style:style style:name="T9" style:family="text">
      <style:text-properties fo:font-size="12pt" officeooo:rsid="0024edca" style:font-size-asian="12pt" style:font-size-complex="12pt"/>
    </style:style>
    <style:style style:name="T10" style:family="text">
      <style:text-properties fo:font-size="12pt" officeooo:rsid="0026d484"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3d69a8" style:font-size-asian="12pt" style:font-weight-asian="normal" style:font-size-complex="12pt" style:font-weight-complex="normal"/>
    </style:style>
    <style:style style:name="T13" style:family="text">
      <style:text-properties fo:font-size="12pt" fo:background-color="#ffff00" loext:char-shading-value="0" style:font-size-asian="12pt" style:font-size-complex="12pt"/>
    </style:style>
    <style:style style:name="T14" style:family="text">
      <style:text-properties fo:font-size="9pt" style:font-size-asian="9pt" style:font-size-complex="9pt"/>
    </style:style>
    <style:style style:name="T15" style:family="text">
      <style:text-properties fo:font-size="9pt" officeooo:rsid="00196319" style:font-size-asian="9pt" style:font-size-complex="9pt"/>
    </style:style>
    <style:style style:name="T16" style:family="text">
      <style:text-properties fo:font-size="9pt" officeooo:rsid="001bc4cc" style:font-size-asian="9pt" style:font-size-complex="9pt"/>
    </style:style>
    <style:style style:name="T17" style:family="text">
      <style:text-properties fo:font-size="9pt" officeooo:rsid="00217818" style:font-size-asian="9pt" style:font-size-complex="9pt"/>
    </style:style>
    <style:style style:name="T18" style:family="text">
      <style:text-properties fo:font-size="9pt" officeooo:rsid="0024edca" style:font-size-asian="9pt" style:font-size-complex="9pt"/>
    </style:style>
    <style:style style:name="T19" style:family="text">
      <style:text-properties fo:font-size="9pt" officeooo:rsid="0026d484" style:font-size-asian="9pt" style:font-size-complex="9pt"/>
    </style:style>
    <style:style style:name="T20" style:family="text">
      <style:text-properties fo:font-size="9pt" officeooo:rsid="00379b55" style:font-size-asian="9pt" style:font-size-complex="9pt"/>
    </style:style>
    <style:style style:name="T21" style:family="text">
      <style:text-properties fo:font-size="9pt" officeooo:rsid="0039d90a" style:font-size-asian="9pt" style:font-size-complex="9pt"/>
    </style:style>
    <style:style style:name="T22" style:family="text">
      <style:text-properties fo:font-size="9pt" officeooo:rsid="003d69a8" style:font-size-asian="9pt" style:font-size-complex="9pt"/>
    </style:style>
    <style:style style:name="T23" style:family="text">
      <style:text-properties fo:font-size="9pt" fo:font-weight="bold" style:font-size-asian="9pt" style:font-weight-asian="bold" style:font-size-complex="9pt" style:font-weight-complex="bold"/>
    </style:style>
    <style:style style:name="T24" style:family="text">
      <style:text-properties fo:font-size="9pt" fo:font-weight="normal" style:font-size-asian="9pt" style:font-weight-asian="normal" style:font-size-complex="9pt" style:font-weight-complex="normal"/>
    </style:style>
    <style:style style:name="T25" style:family="text">
      <style:text-properties fo:font-size="9pt" fo:font-weight="normal" officeooo:rsid="00379b55" style:font-size-asian="9pt" style:font-weight-asian="normal" style:font-size-complex="9pt" style:font-weight-complex="normal"/>
    </style:style>
    <style:style style:name="T26" style:family="text">
      <style:text-properties fo:font-size="9pt" fo:font-weight="normal" officeooo:rsid="00398c4b" style:font-size-asian="9pt" style:font-weight-asian="normal" style:font-size-complex="9pt" style:font-weight-complex="normal"/>
    </style:style>
    <style:style style:name="T27" style:family="text">
      <style:text-properties fo:font-size="9pt" fo:font-weight="normal" officeooo:rsid="003d69a8" style:font-size-asian="9pt" style:font-weight-asian="normal" style:font-size-complex="9pt" style:font-weight-complex="normal"/>
    </style:style>
    <style:style style:name="T28" style:family="text">
      <style:text-properties fo:font-size="9pt" fo:font-weight="normal" officeooo:rsid="00360128" style:font-size-asian="9pt" style:font-weight-asian="normal" style:font-size-complex="9pt" style:font-weight-complex="normal"/>
    </style:style>
    <style:style style:name="T29" style:family="text">
      <style:text-properties style:font-name="Liberation Serif"/>
    </style:style>
    <style:style style:name="T30" style:family="text">
      <style:text-properties style:font-name="Liberation Serif" fo:font-size="12pt" officeooo:rsid="00196319" style:font-size-asian="12pt" style:font-size-complex="12pt"/>
    </style:style>
    <style:style style:name="T31" style:family="text">
      <style:text-properties style:font-name="Liberation Serif" fo:font-size="12pt" fo:font-weight="bold" officeooo:rsid="00217818" style:font-size-asian="12pt" style:font-weight-asian="bold" style:font-size-complex="12pt" style:font-weight-complex="bold"/>
    </style:style>
    <style:style style:name="T32" style:family="text">
      <style:text-properties style:font-name="Liberation Serif" fo:font-size="12pt" fo:font-weight="bold" officeooo:rsid="0025cf05" fo:background-color="#ffff00" loext:char-shading-value="0" style:font-size-asian="12pt" style:font-weight-asian="bold" style:font-size-complex="12pt" style:font-weight-complex="bold"/>
    </style:style>
    <style:style style:name="T33" style:family="text">
      <style:text-properties style:font-name="Liberation Serif" fo:font-size="12pt" fo:font-weight="normal" style:font-size-asian="12pt" style:font-weight-asian="normal" style:font-size-complex="12pt" style:font-weight-complex="normal"/>
    </style:style>
    <style:style style:name="T34" style:family="text">
      <style:text-properties style:font-name="Liberation Serif" fo:font-size="12pt" fo:font-weight="normal" officeooo:rsid="00167245" style:font-size-asian="12pt" style:font-weight-asian="normal" style:font-size-complex="12pt" style:font-weight-complex="normal"/>
    </style:style>
    <style:style style:name="T35" style:family="text">
      <style:text-properties style:font-name="Liberation Serif" fo:font-size="12pt" fo:font-weight="normal" officeooo:rsid="001d9c81" style:font-size-asian="12pt" style:font-weight-asian="normal" style:font-size-complex="12pt" style:font-weight-complex="normal"/>
    </style:style>
    <style:style style:name="T36" style:family="text">
      <style:text-properties style:font-name="Liberation Serif" fo:font-size="12pt" fo:background-color="#ffff00" loext:char-shading-value="0" style:font-size-asian="12pt" style:font-size-complex="12pt"/>
    </style:style>
    <style:style style:name="T37" style:family="text">
      <style:text-properties style:font-name="Liberation Serif" fo:font-weight="bold" officeooo:rsid="002a49a0" fo:background-color="#ffff00" loext:char-shading-value="0" style:font-size-asian="12pt" style:font-weight-asian="bold" style:font-size-complex="12pt" style:font-weight-complex="bold"/>
    </style:style>
    <style:style style:name="T38" style:family="text">
      <style:text-properties style:font-name="Liberation Serif" fo:font-weight="bold" officeooo:rsid="0025cf05" fo:background-color="#ffff00" loext:char-shading-value="0" style:font-size-asian="12pt" style:font-weight-asian="bold" style:font-size-complex="12pt" style:font-weight-complex="bold"/>
    </style:style>
    <style:style style:name="T39" style:family="text">
      <style:text-properties style:font-name="Liberation Serif" fo:font-weight="bold" officeooo:rsid="002f4538" fo:background-color="#ffff00" loext:char-shading-value="0" style:font-size-asian="12pt" style:font-weight-asian="bold" style:font-size-complex="12pt" style:font-weight-complex="bold"/>
    </style:style>
    <style:style style:name="T40" style:family="text">
      <style:text-properties fo:font-weight="bold" style:font-weight-asian="bold" style:font-weight-complex="bold"/>
    </style:style>
    <style:style style:name="T41" style:family="text">
      <style:text-properties officeooo:rsid="001c1d82"/>
    </style:style>
    <style:style style:name="T42" style:family="text">
      <style:text-properties fo:color="#000000" style:font-name="Liberation Serif" fo:font-size="12pt" fo:font-weight="bold" officeooo:rsid="0025cf05" fo:background-color="transparent" loext:char-shading-value="0" style:font-size-asian="12pt" style:font-weight-asian="bold" style:font-size-complex="12pt" style:font-weight-complex="bold"/>
    </style:style>
    <style:style style:name="T43" style:family="text">
      <style:text-properties fo:color="#000000" style:font-name="Liberation Serif" fo:font-size="12pt" fo:font-weight="bold" officeooo:rsid="003a4408" style:font-name-asian="Noto Serif CJK SC" style:font-size-asian="12pt" style:font-weight-asian="bold" style:font-name-complex="Lohit Devanagari" style:font-size-complex="12pt" style:font-weight-complex="bold"/>
    </style:style>
    <style:style style:name="T44" style:family="text">
      <style:text-properties fo:color="#000000" style:font-name="Liberation Serif" fo:font-size="12pt" fo:font-weight="bold" officeooo:rsid="00444888" style:font-name-asian="Noto Serif CJK SC" style:font-size-asian="12pt" style:font-weight-asian="bold" style:font-name-complex="Lohit Devanagari" style:font-size-complex="12pt" style:font-weight-complex="bold"/>
    </style:style>
    <style:style style:name="T45" style:family="text">
      <style:text-properties fo:color="#000000" style:font-name="Liberation Serif" fo:font-size="10.5pt" fo:font-weight="normal" officeooo:rsid="00211669" fo:background-color="transparent" loext:char-shading-value="0" style:font-size-asian="9pt" style:font-size-complex="9pt"/>
    </style:style>
    <style:style style:name="T46" style:family="text">
      <style:text-properties fo:color="#000000" style:font-name="Liberation Mono" fo:font-size="9pt" fo:font-weight="normal" officeooo:rsid="00211669" fo:background-color="transparent" loext:char-shading-value="0" style:font-size-asian="9pt" style:font-size-complex="9pt"/>
    </style:style>
    <style:style style:name="T47" style:family="text">
      <style:text-properties fo:color="#000000" fo:font-size="9pt" style:font-size-asian="9pt" style:font-size-complex="9pt"/>
    </style:style>
    <style:style style:name="T48" style:family="text">
      <style:text-properties officeooo:rsid="0020f9a7"/>
    </style:style>
    <style:style style:name="T49" style:family="text">
      <style:text-properties fo:color="#8b949e" style:font-name="Droid Sans Mono" fo:font-size="10.5pt" fo:font-weight="normal" officeooo:rsid="00211669" fo:background-color="transparent" loext:char-shading-value="0" style:font-size-asian="9pt" style:font-size-complex="9pt"/>
    </style:style>
    <style:style style:name="T50" style:family="text">
      <style:text-properties fo:color="#8b949e" style:font-name="Liberation Serif" fo:font-size="12pt" fo:font-weight="bold" officeooo:rsid="0025cf05" fo:background-color="#ffff00" loext:char-shading-value="0" style:font-size-asian="12pt" style:font-weight-asian="bold" style:font-size-complex="12pt" style:font-weight-complex="bold"/>
    </style:style>
    <style:style style:name="T51" style:family="text">
      <style:text-properties officeooo:rsid="0022fbb4"/>
    </style:style>
    <style:style style:name="T52" style:family="text">
      <style:text-properties style:font-size-asian="9pt" style:font-size-complex="9pt"/>
    </style:style>
    <style:style style:name="T53" style:family="text">
      <style:text-properties officeooo:rsid="0022fbb4" style:font-size-asian="9pt" style:font-size-complex="9pt"/>
    </style:style>
    <style:style style:name="T54" style:family="text">
      <style:text-properties style:font-name="Liberation Mono" fo:font-size="9pt" style:font-size-asian="9pt" style:font-size-complex="9pt"/>
    </style:style>
    <style:style style:name="T55" style:family="text">
      <style:text-properties style:font-name="Liberation Mono" fo:font-size="9pt" officeooo:rsid="0024edca" style:font-size-asian="9pt" style:font-size-complex="9pt"/>
    </style:style>
    <style:style style:name="T56" style:family="text">
      <style:text-properties officeooo:rsid="00264afa"/>
    </style:style>
    <style:style style:name="T57" style:family="text">
      <style:text-properties officeooo:rsid="002a49a0"/>
    </style:style>
    <style:style style:name="T58" style:family="text">
      <style:text-properties style:text-underline-style="none"/>
    </style:style>
    <style:style style:name="T59" style:family="text">
      <style:text-properties style:font-name="Liberation Mono" fo:font-size="9pt" style:font-size-asian="9pt" style:font-size-complex="9pt"/>
    </style:style>
    <style:style style:name="T60" style:family="text">
      <style:text-properties fo:color="#2a6099" fo:font-size="9pt" style:font-size-asian="9pt" style:font-size-complex="9pt"/>
    </style:style>
    <style:style style:name="T61" style:family="text">
      <style:text-properties fo:color="#2a6099" fo:font-size="9pt" officeooo:rsid="00379b55" style:font-size-asian="9pt" style:font-size-complex="9pt"/>
    </style:style>
    <style:style style:name="T62" style:family="text">
      <style:text-properties fo:color="#2a6099" fo:font-size="9pt" fo:background-color="transparent" loext:char-shading-value="0" style:font-size-asian="9pt" style:font-size-complex="9pt"/>
    </style:style>
    <style:style style:name="T63" style:family="text">
      <style:text-properties fo:font-weight="normal" style:font-weight-asian="normal" style:font-weight-complex="normal"/>
    </style:style>
    <style:style style:name="T64" style:family="text">
      <style:text-properties fo:font-weight="normal" officeooo:rsid="00398c4b" style:font-weight-asian="normal" style:font-weight-complex="normal"/>
    </style:style>
    <style:style style:name="T65" style:family="text">
      <style:text-properties fo:font-weight="normal" officeooo:rsid="003d69a8" style:font-weight-asian="normal" style:font-weight-complex="normal"/>
    </style:style>
    <style:style style:name="T66" style:family="text">
      <style:text-properties officeooo:rsid="00360128"/>
    </style:style>
    <style:style style:name="T67" style:family="text">
      <style:text-properties officeooo:rsid="00379b55"/>
    </style:style>
    <style:style style:name="T68" style:family="text">
      <style:text-properties officeooo:rsid="00398c4b"/>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rchivos y carpetas necesarias para ejecutar los códigos</text:h>
      <text:p text:style-name="P18">Los siguientes notebooks requieren diferentes carpetas y archivos para poder ejecutarse correctamente.<text:line-break/>Cada ruta utilizada en los códigos deberá actualizarse según la ubicación local donde se encuentren almacenados los datos en cada equipo.</text:p>
      <text:p text:style-name="P9"/>
      <text:h text:style-name="P7" text:outline-level="3">1. Entrenamiento de modelos</text:h>
      <text:p text:style-name="P18">Notebooks:</text:p>
      <text:list xml:id="list920747566" text:style-name="L1">
        <text:list-item>
          <text:p text:style-name="P94"><text:span text:style-name="Source_20_Text"><text:span text:style-name="T14">entrenamiento_modelos_sin_balanceo.ipynb</text:span></text:span><text:span text:style-name="T14"> </text:span></text:p>
        </text:list-item>
        <text:list-item>
          <text:p text:style-name="P42"><text:span text:style-name="Source_20_Text"><text:span text:style-name="T14">entrenamiento_modelos_balanceados.ipynb</text:span></text:span><text:span text:style-name="T14"> </text:span></text:p>
        </text:list-item>
      </text:list>
      <text:p text:style-name="P18">Estos notebooks utilizan las siguientes rutas:</text:p>
      <text:section text:style-name="Sect1" text:name="code-block-viewer">
        <text:p text:style-name="Preformatted_20_Text"><text:span text:style-name="Source_20_Text"><text:span text:style-name="T14">dir_carpeta_1 = '/ruta/Etiquetador_2_0/'</text:span></text:span></text:p>
        <text:p text:style-name="Preformatted_20_Text"><text:span text:style-name="Source_20_Text"><text:span text:style-name="T14">dir_carpeta_2 = '/ruta/Etiquetador-INSP/'</text:span></text:span></text:p>
        <text:p text:style-name="Preformatted_20_Text"><text:span text:style-name="Source_20_Text"><text:span text:style-name="T14">dir_carpeta_3 = '/ruta/etiquetadas_x51/'</text:span></text:span></text:p>
        <text:p text:style-name="Preformatted_20_Text"><text:span text:style-name="Source_20_Text"><text:span text:style-name="T14">dir_carpeta_4 = '/ruta/etiquetadas_la_laguna/'</text:span></text:span></text:p>
        <text:p text:style-name="P13"><text:span text:style-name="Source_20_Text"><text:span text:style-name="T14">dir_carpeta_5 = '/ruta/etiquetadas_Delicias/'</text:span></text:span></text:p>
      </text:section>
      <text:p text:style-name="P16"><text:span text:style-name="T1">Las carpetas necesarias se encuentran en el siguiente enlace de Google Drive </text:span><text:span text:style-name="T2">(</text:span><text:span text:style-name="Strong_20_Emphasis"><text:span text:style-name="T34">SetDroneDataset-TapachulaRGB</text:span></text:span><text:span text:style-name="T34">)</text:span><text:span text:style-name="T33">:</text:span></text:p>
      <text:p text:style-name="P16"><text:a xlink:type="simple" xlink:href="https://drive.google.com/drive/folders/1VVvzgeX1ijy2it0-73B0oUnwz_FeZ896?usp=sharing" text:style-name="Internet_20_link" text:visited-style-name="Visited_20_Internet_20_Link"><text:span text:style-name="T1">https://drive.google.com/drive/folders/1VVvzgeX1ijy2it0-73B0oUnwz_FeZ896?usp=sharing</text:span></text:a></text:p>
      <text:p text:style-name="P18">Dentro de esta carpeta se encuentran:</text:p>
      <text:list xml:id="list2482430288" text:style-name="L2">
        <text:list-item>
          <text:p text:style-name="P95"><text:span text:style-name="Source_20_Text"><text:span text:style-name="T14">img_originales_etiquetadas</text:span></text:span><text:span text:style-name="T1"><text:line-break/>Contiene el conjunto completo de imágenes etiquetadas utilizadas para construir el dataset </text:span><text:span text:style-name="Strong_20_Emphasis"><text:span text:style-name="T11">SetDroneDataset-TapachulaRGB</text:span></text:span><text:span text:style-name="T1">. </text:span></text:p>
        </text:list-item>
        <text:list-item>
          <text:p text:style-name="P96">Carpetas correspondientes a cada variable de ruta: </text:p>
          <text:list>
            <text:list-item>
              <text:p text:style-name="P95"><text:span text:style-name="Source_20_Text"><text:span text:style-name="T14">Etiquetador_2_0</text:span></text:span><text:span text:style-name="T14"> → </text:span><text:span text:style-name="Source_20_Text"><text:span text:style-name="T14">dir_carpeta_1</text:span></text:span><text:span text:style-name="T14"> </text:span></text:p>
            </text:list-item>
            <text:list-item>
              <text:p text:style-name="P95"><text:span text:style-name="Source_20_Text"><text:span text:style-name="T14">Etiquetador-INSP</text:span></text:span><text:span text:style-name="T14"> → </text:span><text:span text:style-name="Source_20_Text"><text:span text:style-name="T14">dir_carpeta_2</text:span></text:span><text:span text:style-name="T14"> </text:span></text:p>
            </text:list-item>
            <text:list-item>
              <text:p text:style-name="P95"><text:span text:style-name="Source_20_Text"><text:span text:style-name="T14">etiquetadas_x51</text:span></text:span><text:span text:style-name="T14"> → </text:span><text:span text:style-name="Source_20_Text"><text:span text:style-name="T14">dir_carpeta_3</text:span></text:span><text:span text:style-name="T14"> </text:span></text:p>
            </text:list-item>
            <text:list-item>
              <text:p text:style-name="P95"><text:span text:style-name="Source_20_Text"><text:span text:style-name="T14">etiquetadas_la_laguna</text:span></text:span><text:span text:style-name="T14"> → </text:span><text:span text:style-name="Source_20_Text"><text:span text:style-name="T14">dir_carpeta_4</text:span></text:span><text:span text:style-name="T14"> </text:span></text:p>
            </text:list-item>
            <text:list-item>
              <text:p text:style-name="P43"><text:span text:style-name="Source_20_Text"><text:span text:style-name="T14">etiquetadas_Delicias</text:span></text:span><text:span text:style-name="T14"> → </text:span><text:span text:style-name="Source_20_Text"><text:span text:style-name="T14">dir_carpeta_5</text:span></text:span><text:span text:style-name="T14"> </text:span></text:p>
            </text:list-item>
          </text:list>
        </text:list-item>
      </text:list>
      <text:p text:style-name="P9"/>
      <text:h text:style-name="Heading_20_2" text:outline-level="2"><text:span text:style-name="T13">2. Desempeño de los modelos sobre el conjunto de prueba </text:span><text:span text:style-name="Source_20_Text"><text:span text:style-name="T36">test_set_rgb</text:span></text:span></text:h>
      <text:p text:style-name="Text_20_body"><text:span text:style-name="Strong_20_Emphasis"><text:span text:style-name="T1">Notebooks:</text:span></text:span></text:p>
      <text:list xml:id="list4077975993" text:style-name="L3">
        <text:list-item>
          <text:p text:style-name="P99"><text:span text:style-name="Source_20_Text"><text:span text:style-name="T14">desempeño_knn_por_img_test_set_rgb.ipynb</text:span></text:span><text:span text:style-name="T14"> </text:span></text:p>
        </text:list-item>
        <text:list-item>
          <text:p text:style-name="P99"><text:span text:style-name="Source_20_Text"><text:span text:style-name="T14">desempeño_rl_por_img_test_set_rgb.ipynb</text:span></text:span><text:span text:style-name="T14"> </text:span></text:p>
        </text:list-item>
        <text:list-item>
          <text:p text:style-name="P99"><text:span text:style-name="Source_20_Text"><text:span text:style-name="T14">desempeño_svm_por_img_test_set_rgb.ipynb</text:span></text:span><text:span text:style-name="T14"> </text:span></text:p>
        </text:list-item>
        <text:list-item>
          <text:p text:style-name="P99"><text:span text:style-name="Source_20_Text"><text:span text:style-name="T14">desempeño_rf_por_img_test_set_rgb.ipynb</text:span></text:span><text:span text:style-name="T14"> </text:span></text:p>
        </text:list-item>
        <text:list-item>
          <text:p text:style-name="P44"><text:span text:style-name="Source_20_Text"><text:span text:style-name="T14">desempeño_mlp_por_img_test_set_rgb.ipynb</text:span></text:span><text:span text:style-name="T14"> </text:span></text:p>
        </text:list-item>
      </text:list>
      <text:p text:style-name="P18"><text:soft-page-break/>Cada notebook requiere las siguientes rutas:</text:p>
      <text:h text:style-name="P5" text:outline-level="3">Ruta del conjunto de prueba</text:h>
      <text:list xml:id="list21487395" text:style-name="L4">
        <text:list-item>
          <text:p text:style-name="P45"><text:span text:style-name="Source_20_Text"><text:span text:style-name="T14">ruta_etiquetas_manuales = '/ruta/test_set_rgb/'</text:span></text:span><text:span text:style-name="T14"> </text:span></text:p>
        </text:list-item>
      </text:list>
      <text:p text:style-name="P16"><text:span text:style-name="T1">La carpeta correspondiente se encuentra en </text:span><text:span text:style-name="T3">(test_set_rgb)</text:span><text:span text:style-name="T1">:</text:span></text:p>
      <text:p text:style-name="P16"><text:a xlink:type="simple" xlink:href="https://drive.google.com/drive/folders/1K6Irsw0WHXWKRMfe4bm82g1zk5-7LHjs?usp=sharing" text:style-name="Internet_20_link" text:visited-style-name="Visited_20_Internet_20_Link"><text:span text:style-name="T1">https://drive.google.com/drive/folders/1K6Irsw0WHXWKRMfe4bm82g1zk5-7LHjs?usp=sharing</text:span></text:a></text:p>
      <text:p text:style-name="P18">Esta carpeta contiene:</text:p>
      <text:list xml:id="list3864726066" text:style-name="L5">
        <text:list-item>
          <text:p text:style-name="P97">Las 23 imágenes originales utilizadas como conjunto de prueba. </text:p>
        </text:list-item>
        <text:list-item>
          <text:p text:style-name="P101"><text:span text:style-name="T1">Un archivo </text:span><text:span text:style-name="Source_20_Text"><text:span text:style-name="T14">.csv</text:span></text:span><text:span text:style-name="T1"> por imagen </text:span><text:span text:style-name="T4">que tiene la siguiente estructura (</text:span><text:span text:style-name="Source_20_Text"><text:span text:style-name="T15">Etiquetado_ + name_image.csv</text:span></text:span><text:span text:style-name="T4">)</text:span><text:span text:style-name="T1">, donde cada fila contiene: </text:span></text:p>
          <text:list>
            <text:list-item>
              <text:p text:style-name="P97">el índice del superpíxel, </text:p>
            </text:list-item>
            <text:list-item>
              <text:p text:style-name="P97">la categoría asignada, </text:p>
            </text:list-item>
            <text:list-item>
              <text:p text:style-name="P48">y las 129 características extraídas para cada superpíxel. </text:p>
            </text:list-item>
          </text:list>
        </text:list-item>
      </text:list>
      <text:list xml:id="list4293640780" text:style-name="L6">
        <text:list-item>
          <text:p text:style-name="P50"><text:span text:style-name="T1">Un archivo </text:span><text:span text:style-name="Source_20_Text"><text:span text:style-name="T14">.tif</text:span></text:span><text:span text:style-name="T14"> </text:span><text:span text:style-name="T1">por imagen, que muestra la imagen segmentada y etiquetada. </text:span></text:p>
        </text:list-item>
      </text:list>
      <text:h text:style-name="P5" text:outline-level="3">Rutas de predicción por modelo</text:h>
      <text:list xml:id="list2979169911" text:style-name="L7">
        <text:list-item>
          <text:p text:style-name="P102"><text:span text:style-name="Source_20_Text"><text:span text:style-name="T14">ruta_predicciones_modelo = '/ruta/prediccion_img_prueba_knn/'</text:span></text:span><text:span text:style-name="T14"> </text:span></text:p>
        </text:list-item>
        <text:list-item>
          <text:p text:style-name="P102"><text:span text:style-name="Source_20_Text"><text:span text:style-name="T14">ruta_predicciones_modelo = '/ruta/prediccion_img_prueba_rl/'</text:span></text:span><text:span text:style-name="T14"> </text:span></text:p>
        </text:list-item>
        <text:list-item>
          <text:p text:style-name="P102"><text:span text:style-name="Source_20_Text"><text:span text:style-name="T14">ruta_predicciones_modelo = '/ruta/prediccion_img_prueba_svm/'</text:span></text:span><text:span text:style-name="T14"> </text:span></text:p>
        </text:list-item>
        <text:list-item>
          <text:p text:style-name="P102"><text:span text:style-name="Source_20_Text"><text:span text:style-name="T14">ruta_predicciones_modelo = '/ruta/prediccion_img_prueba_rf/'</text:span></text:span><text:span text:style-name="T14"> </text:span></text:p>
        </text:list-item>
        <text:list-item>
          <text:p text:style-name="P51"><text:span text:style-name="Source_20_Text"><text:span text:style-name="T14">ruta_predicciones_modelo = '/ruta/prediccion_img_prueba_mlp/'</text:span></text:span><text:span text:style-name="T14"> </text:span></text:p>
        </text:list-item>
      </text:list>
      <text:p text:style-name="P22"><text:span text:style-name="T1">Las carpetas correspondientes se encuentran en </text:span><text:span text:style-name="T4">(</text:span><text:span text:style-name="Source_20_Text"><text:span text:style-name="T30">predicciones_modelos_test_set_rgb</text:span></text:span><text:span text:style-name="T4">)</text:span><text:span text:style-name="T1">:<text:line-break/></text:span><text:a xlink:type="simple" xlink:href="https://drive.google.com/file/d/10TO4trOLXvsGXxeXeis8aweeIUrAtdu_/view?usp=sharing" text:style-name="Internet_20_link" text:visited-style-name="Visited_20_Internet_20_Link"><text:span text:style-name="T1">https://drive.google.com/file/d/10TO4trOLXvsGXxeXeis8aweeIUrAtdu_/view?usp=sharing</text:span></text:a></text:p>
      <text:p text:style-name="P18">Dentro de esta carpeta se encuentran:</text:p>
      <text:list xml:id="list2392057038" text:style-name="L8">
        <text:list-item>
          <text:p text:style-name="P103"><text:span text:style-name="Source_20_Text"><text:span text:style-name="T14">prediccion_img_prueba_knn</text:span></text:span><text:span text:style-name="T14"> </text:span></text:p>
        </text:list-item>
        <text:list-item>
          <text:p text:style-name="P103"><text:span text:style-name="Source_20_Text"><text:span text:style-name="T14">prediccion_img_prueba_rl</text:span></text:span><text:span text:style-name="T14"> </text:span></text:p>
        </text:list-item>
        <text:list-item>
          <text:p text:style-name="P103"><text:span text:style-name="Source_20_Text"><text:span text:style-name="T14">prediccion_img_prueba_svm</text:span></text:span><text:span text:style-name="T14"> </text:span></text:p>
        </text:list-item>
        <text:list-item>
          <text:p text:style-name="P103"><text:span text:style-name="Source_20_Text"><text:span text:style-name="T14">prediccion_img_prueba_rf</text:span></text:span><text:span text:style-name="T14"> </text:span></text:p>
        </text:list-item>
        <text:list-item>
          <text:p text:style-name="P52"><text:span text:style-name="Source_20_Text"><text:span text:style-name="T14">prediccion_img_prueba_mlp</text:span></text:span><text:span text:style-name="T14"> </text:span></text:p>
        </text:list-item>
      </text:list>
      <text:p text:style-name="P18">respectivamente, según el modelo utilizado en cada notebook.</text:p>
      <text:p text:style-name="P10"/>
      <text:h text:style-name="P4" text:outline-level="2"><text:span text:style-name="T5">3</text:span><text:span text:style-name="T1">. </text:span><text:span text:style-name="T5">Medir el desempeño del modelo considerando las 11 categorías, s</text:span><text:span text:style-name="T1">obre </text:span><text:span text:style-name="T6">las 3 imágenes seleccionadas pertenecientes al conjunto test_set_rgb</text:span></text:h>
      <text:p text:style-name="P23"><text:span text:style-name="Strong_20_Emphasis"><text:span text:style-name="T1">Notebooks:</text:span></text:span></text:p>
      <text:list xml:id="list163504498970742" text:continue-list="list4077975993" text:style-name="L3">
        <text:list-item>
          <text:p text:style-name="P100"><text:span text:style-name="Source_20_Text"><text:span text:style-name="T16">funcion_medir_desempeño_modelo_considerando_sin_etiqueta_estrategia1.ipynb</text:span></text:span></text:p>
        </text:list-item>
        <text:list-item>
          <text:p text:style-name="P100"><text:span text:style-name="Source_20_Text"><text:span text:style-name="T16">funcion_medir_desempeño_modelo_considerando_sin_etiqueta_estrategia2.ipynb</text:span></text:span></text:p>
        </text:list-item>
        <text:list-item>
          <text:p text:style-name="P100"><text:span text:style-name="Source_20_Text"><text:span text:style-name="T16">funcion_medir_desempeño_modelo_considerando_sin_etiqueta_estrategia3.ipynb</text:span></text:span></text:p>
        </text:list-item>
        <text:list-item>
          <text:p text:style-name="P100"><text:soft-page-break/><text:span text:style-name="Source_20_Text"><text:span text:style-name="T16">funcion_medir_desempeño_modelo_considerando_sin_etiqueta_estrategia4.ipynb</text:span></text:span></text:p>
        </text:list-item>
        <text:list-item>
          <text:p text:style-name="P100"><text:span text:style-name="Source_20_Text"><text:span text:style-name="T16">funcion_medir_desempeño_modelo_considerando_sin_etiqueta_estrategia5.ipynb</text:span></text:span></text:p>
        </text:list-item>
      </text:list>
      <text:p text:style-name="P29"><text:span text:style-name="Source_20_Text"><text:span text:style-name="T16"/></text:span></text:p>
      <text:p text:style-name="P24">Cada notebook requiere:</text:p>
      <text:list xml:id="list587503056" text:style-name="L9">
        <text:list-item>
          <text:p text:style-name="P53">ruta_carpeta = "/<text:span text:style-name="T41">ruta</text:span>/predicciones_3_img_prueba_estrategias" </text:p>
        </text:list-item>
      </text:list>
      <text:p text:style-name="P25"><text:span text:style-name="T1">Las carpeta necesarias se encuentra en el siguiente enlace de Google Drive </text:span><text:span text:style-name="T2">(</text:span><text:span text:style-name="Strong_20_Emphasis"><text:span text:style-name="T35">predicciones_3_img_prueba_estrategias</text:span></text:span><text:span text:style-name="T34">)</text:span><text:span text:style-name="T33">:</text:span></text:p>
      <text:p text:style-name="P25"><text:a xlink:type="simple" xlink:href="https://drive.google.com/file/d/1gjpuEiHO6TqDkTAygPmgqUKIRpJMBjzH/view?usp=sharing" text:style-name="Internet_20_link" text:visited-style-name="Visited_20_Internet_20_Link"><text:span text:style-name="T1">https://drive.google.com/file/d/1gjpuEiHO6TqDkTAygPmgqUKIRpJMBjzH/view?usp=sharing</text:span></text:a></text:p>
      <text:p text:style-name="P19">Dentro de esta carpeta se encuentran:</text:p>
      <text:list xml:id="list1659603498" text:style-name="L10">
        <text:list-item>
          <text:p text:style-name="P104">Las 3 imágenes originales seleccionadas. </text:p>
        </text:list-item>
        <text:list-item>
          <text:p text:style-name="P104">Los archivos <text:span text:style-name="Source_20_Text"><text:span text:style-name="T14">.csv</text:span></text:span> etiquetados manualmente de cada imagen <text:span text:style-name="T14">(</text:span><text:span text:style-name="Source_20_Text"><text:span text:style-name="T14">Etiquetado_ + name_image.csv</text:span></text:span><text:span text:style-name="T14">)</text:span>, así como su correspondiente archivo <text:span text:style-name="Source_20_Text"><text:span text:style-name="T14">.tif</text:span></text:span>, que muestra la imagen segmentada y etiquetada. </text:p>
        </text:list-item>
        <text:list-item>
          <text:p text:style-name="P54">Los archivos <text:span text:style-name="Source_20_Text"><text:span text:style-name="T14">.csv</text:span></text:span> predichos por el modelo MLP (Redes Neuronales Multicapa) de cada imagen <text:span text:style-name="T14">(</text:span><text:span text:style-name="Source_20_Text"><text:span text:style-name="T14">Caract_paralelo_ + name_image.csv</text:span></text:span><text:span text:style-name="T14">)</text:span>, así como su correspondiente archivo <text:span text:style-name="Source_20_Text"><text:span text:style-name="T14">.tif</text:span></text:span>, que muestra la imagen segmentada y clasificada.</text:p>
        </text:list-item>
      </text:list>
      <text:p text:style-name="P11"/>
      <text:h text:style-name="P3" text:outline-level="2"><text:span text:style-name="T7">4</text:span><text:span text:style-name="T1">. </text:span><text:span text:style-name="T10">E</text:span><text:span text:style-name="T43">valuación </text:span><text:span text:style-name="T44">de </text:span><text:span text:style-name="T43">diferentes umbrales </text:span><text:span text:style-name="T44">para asignar la categoria “sin etiqueta” de las estrategias propuestas</text:span></text:h>
      <text:p text:style-name="P15">Notebooks: </text:p>
      <text:p text:style-name="P14"/>
      <text:list xml:id="list3077966127" text:style-name="L11">
        <text:list-item>
          <text:p text:style-name="P38">evaluacion_diferentes_umbrales_coberturas_ambiguas_Estrategia1.ipynb</text:p>
        </text:list-item>
        <text:list-item>
          <text:p text:style-name="P38">evaluacion_diferentes_umbrales_coberturas_ambiguas_Estrategia<text:span text:style-name="T48">2</text:span>.ipynb</text:p>
        </text:list-item>
        <text:list-item>
          <text:p text:style-name="P39">evaluacion_diferentes_umbrales_coberturas_ambiguas_Estrategia<text:span text:style-name="T51">3</text:span>.ipynb</text:p>
        </text:list-item>
        <text:list-item>
          <text:p text:style-name="P39">evaluacion_diferentes_umbrales_coberturas_ambiguas_Estrategia<text:span text:style-name="T51">4</text:span>.ipynb</text:p>
        </text:list-item>
        <text:list-item>
          <text:p text:style-name="P40"><text:span text:style-name="T52">evaluacion_diferentes_umbrales_coberturas_ambiguas_Estrategia</text:span><text:span text:style-name="T53">5</text:span><text:span text:style-name="T52">.ipynb</text:span></text:p>
        </text:list-item>
      </text:list>
      <text:p text:style-name="P14"/>
      <text:p text:style-name="P20">Cada notebook requiere las siguientes rutas:</text:p>
      <text:h text:style-name="P6" text:outline-level="3">Ruta del conjunto de prueba</text:h>
      <text:list xml:id="list163504283463374" text:continue-list="list21487395" text:style-name="L4">
        <text:list-item>
          <text:p text:style-name="P46"><text:span text:style-name="Source_20_Text"><text:span text:style-name="T14">ruta_etiquetas_manuales = '/ruta/test_set_rgb/'</text:span></text:span><text:span text:style-name="T14"> </text:span></text:p>
        </text:list-item>
      </text:list>
      <text:p text:style-name="P17"><text:span text:style-name="T1">La carpeta correspondiente se encuentra en </text:span><text:span text:style-name="T3">(test_set_rgb)</text:span><text:span text:style-name="T1">:</text:span></text:p>
      <text:p text:style-name="P17"><text:a xlink:type="simple" xlink:href="https://drive.google.com/drive/folders/1K6Irsw0WHXWKRMfe4bm82g1zk5-7LHjs?usp=sharing" text:style-name="Internet_20_link" text:visited-style-name="Visited_20_Internet_20_Link"><text:span text:style-name="T1">https://drive.google.com/drive/folders/1K6Irsw0WHXWKRMfe4bm82g1zk5-7LHjs?usp=sharing</text:span></text:a></text:p>
      <text:p text:style-name="P20">Esta carpeta contiene:</text:p>
      <text:list xml:id="list1721748906" text:style-name="L12">
        <text:list-item>
          <text:p text:style-name="P98">Las 23 imágenes originales utilizadas como conjunto de prueba. </text:p>
        </text:list-item>
        <text:list-item>
          <text:p text:style-name="P105"><text:span text:style-name="T1">Un archivo </text:span><text:span text:style-name="Source_20_Text"><text:span text:style-name="T14">.csv</text:span></text:span><text:span text:style-name="T1"> por imagen </text:span><text:span text:style-name="T9">con</text:span><text:span text:style-name="T4"> estructura (</text:span><text:span text:style-name="Source_20_Text"><text:span text:style-name="T15">Etiquetado_ + name_image.csv</text:span></text:span><text:span text:style-name="T4">)</text:span></text:p>
        </text:list-item>
      </text:list>
      <text:list xml:id="list1788955495" text:style-name="L13">
        <text:list-item>
          <text:p text:style-name="P55"><text:span text:style-name="T1">Un archivo </text:span><text:span text:style-name="Source_20_Text"><text:span text:style-name="T14">.tif</text:span></text:span><text:span text:style-name="T14"> </text:span><text:span text:style-name="T1">por imagen, que muestra la imagen segmentada y etiquetada.</text:span></text:p>
        </text:list-item>
      </text:list>
      <text:h text:style-name="P8" text:outline-level="3"><text:soft-page-break/><text:span text:style-name="T1">Ruta de </text:span><text:span text:style-name="T8">la </text:span><text:span text:style-name="T1">predicción por </text:span><text:span text:style-name="T8">el modelo MLP (Redes neurona</text:span><text:span text:style-name="T9">les multicapa</text:span><text:span text:style-name="T8">)</text:span></text:h>
      <text:list xml:id="list2287595645" text:style-name="L14">
        <text:list-item>
          <text:p text:style-name="P56"><text:span text:style-name="Source_20_Text"><text:span text:style-name="T14">ruta_predicciones_modelo = '/ruta/prediccion_img_prueba_mlp/'</text:span></text:span><text:span text:style-name="T14"> </text:span></text:p>
        </text:list-item>
      </text:list>
      <text:p text:style-name="P17"><text:span text:style-name="T1">Las carpeta se encuentran en </text:span><text:span text:style-name="T4">(</text:span><text:span text:style-name="Source_20_Text"><text:span text:style-name="T30">predicciones_modelos_test_set_rgb</text:span></text:span><text:span text:style-name="T4">)</text:span><text:span text:style-name="T1">:</text:span></text:p>
      <text:p text:style-name="P17"><text:a xlink:type="simple" xlink:href="https://drive.google.com/file/d/10TO4trOLXvsGXxeXeis8aweeIUrAtdu_/view?usp=sharing" text:style-name="Internet_20_link" text:visited-style-name="Visited_20_Internet_20_Link"><text:span text:style-name="T1">https://drive.google.com/file/d/10TO4trOLXvsGXxeXeis8aweeIUrAtdu_/view?usp=sharing</text:span></text:a></text:p>
      <text:p text:style-name="P27"><text:span text:style-name="T29">De esta carpeta únicamente se utiliza: </text:span><text:span text:style-name="Source_20_Text"><text:span text:style-name="T54">prediccion_img_prueba_mlp</text:span></text:span></text:p>
      <text:p text:style-name="P28">La cual contiene:</text:p>
      <text:list xml:id="list2530444070" text:style-name="L15">
        <text:list-item>
          <text:p text:style-name="P106"><text:span text:style-name="T29">Los archivos </text:span><text:span text:style-name="Source_20_Text"><text:span text:style-name="T54">.csv</text:span></text:span><text:span text:style-name="T54"> </text:span><text:span text:style-name="T29">predichos por el modelo MLP </text:span><text:span text:style-name="Source_20_Text"><text:span text:style-name="T55">(C</text:span></text:span><text:span text:style-name="Source_20_Text"><text:span text:style-name="T54">aract_paralelo_ + name_image.csv</text:span></text:span><text:span text:style-name="T54">)</text:span><text:span text:style-name="T29">. </text:span></text:p>
        </text:list-item>
        <text:list-item>
          <text:p text:style-name="P106"><text:span text:style-name="T29">Su correspondiente archivo </text:span><text:span text:style-name="Source_20_Text"><text:span text:style-name="T54">.</text:span></text:span><text:span text:style-name="Source_20_Text"><text:span text:style-name="T55">tif</text:span></text:span><text:span text:style-name="T29">, que muestra la imagen segmentada y clasificada. </text:span></text:p>
        </text:list-item>
        <text:list-item>
          <text:p text:style-name="P57">Además, en esta carpeta se almacenan los archivos de salida generados por el script. </text:p>
        </text:list-item>
      </text:list>
      <text:p text:style-name="P26"><text:span text:style-name="Source_20_Text"><text:span text:style-name="T31">Ruta de las imágenes de prueba seleccionadas</text:span></text:span><text:span text:style-name="Source_20_Text"><text:span text:style-name="T17"> </text:span></text:span></text:p>
      <text:p text:style-name="P27"><text:span text:style-name="Source_20_Text"><text:span text:style-name="T54">ruta_predicciones_csv = "/ruta/predicciones_3_img_prueba_estrategias"</text:span></text:span></text:p>
      <text:p text:style-name="P27"><text:span text:style-name="T29">La carpeta correspondiente se encuentra en (</text:span><text:span text:style-name="Source_20_Text"><text:span text:style-name="T29">predicciones_3_img_prueba_estrategias</text:span></text:span><text:span text:style-name="T29">):</text:span></text:p>
      <text:p text:style-name="P27"><text:a xlink:type="simple" xlink:href="https://drive.google.com/file/d/1gjpuEiHO6TqDkTAygPmgqUKIRpJMBjzH/view?usp=sharing" office:target-frame-name="_new" xlink:show="replace" text:style-name="Internet_20_link" text:visited-style-name="Visited_20_Internet_20_Link"><text:span text:style-name="T29">https://drive.google.com/file/d/1gjpuEiHO6TqDkTAygPmgqUKIRpJMBjzH/view?usp=sharing</text:span></text:a></text:p>
      <text:p text:style-name="P28">Dentro de esta carpeta se encuentran:</text:p>
      <text:list xml:id="list3742484421" text:style-name="L16">
        <text:list-item>
          <text:p text:style-name="P107">Las 3 imágenes originales seleccionadas. </text:p>
        </text:list-item>
        <text:list-item>
          <text:p text:style-name="P108"><text:span text:style-name="T29">Los archivos </text:span><text:span text:style-name="Source_20_Text"><text:span text:style-name="T29">.</text:span></text:span><text:span text:style-name="Source_20_Text"><text:span text:style-name="T54">csv</text:span></text:span><text:span text:style-name="T29"> etiquetados manualmente (</text:span><text:span text:style-name="Source_20_Text"><text:span text:style-name="T54">Etiquetado_ + name_image.csv</text:span></text:span><text:span text:style-name="T29">), junto con su correspondiente archivo </text:span><text:span text:style-name="Source_20_Text"><text:span text:style-name="T29">.</text:span></text:span><text:span text:style-name="Source_20_Text"><text:span text:style-name="T54">tif</text:span></text:span><text:span text:style-name="T54">. </text:span></text:p>
        </text:list-item>
        <text:list-item>
          <text:p text:style-name="P59"><text:span text:style-name="Source_20_Text"><text:span text:style-name="T45">Los archivos .</text:span></text:span><text:span text:style-name="Source_20_Text"><text:span text:style-name="T46">csv</text:span></text:span><text:span text:style-name="Source_20_Text"><text:span text:style-name="T45"> predichos por el modelo MLP </text:span></text:span><text:span text:style-name="Source_20_Text"><text:span text:style-name="T46">(Caract_paralelo_ + name_image.csv),</text:span></text:span><text:span text:style-name="Source_20_Text"><text:span text:style-name="T45"> junto con su correspondiente archivo </text:span></text:span><text:span text:style-name="Source_20_Text"><text:span text:style-name="T46">.tif.</text:span></text:span></text:p>
        </text:list-item>
      </text:list>
      <text:p text:style-name="P12"><text:span text:style-name="Source_20_Text"><text:span text:style-name="T42"/></text:span></text:p>
      <text:h text:style-name="P2" text:outline-level="2"><text:span text:style-name="Source_20_Text"><text:span text:style-name="T32">5. Benchmark para determinar el número óptimo de hilos que minimiza el tiempo computacional en la extracción de características y el pintado</text:span></text:span></text:h>
      <text:p text:style-name="Text_20_body"><text:span text:style-name="Strong_20_Emphasis">Notebook:</text:span></text:p>
      <text:list xml:id="list2629538528" text:style-name="L17">
        <text:list-item>
          <text:p text:style-name="P60"><text:span text:style-name="Source_20_Text"><text:span text:style-name="T14">benchmark_paralelizacion_extraccion.ipynb</text:span></text:span></text:p>
        </text:list-item>
      </text:list>
      <text:p text:style-name="Text_20_body">Este notebook requiere los siguientes archivos:</text:p>
      <text:h text:style-name="P5" text:outline-level="3">Ruta de la imagen utilizada para los experimentos</text:h>
      <text:list xml:id="list3445311639" text:style-name="L18">
        <text:list-item>
          <text:p text:style-name="P62"><text:span text:style-name="Source_20_Text"><text:span text:style-name="T14">rut_image = "/ruta/image_x5_331.jpg"</text:span></text:span></text:p>
        </text:list-item>
      </text:list>
      <text:p text:style-name="P18">El archivo se encuentra disponible <text:span text:style-name="T57">dentro del github y se llama</text:span>:</text:p>
      <text:p text:style-name="P18"><text:a xlink:type="simple" xlink:href="https://github.com/SarahiVenturaaaa/segmentacion-automatica-paisaje-urbano-dengue/blob/main/image_x5_331.jpg" text:style-name="Internet_20_link" text:visited-style-name="Visited_20_Internet_20_Link"><text:span text:style-name="T58">image_x5_331.jpg</text:span></text:a></text:p>
      <text:h text:style-name="P5" text:outline-level="3">Ruta del modelo entrenado</text:h>
      <text:list xml:id="list2781133953" text:style-name="L19">
        <text:list-item>
          <text:p text:style-name="P63"><text:span text:style-name="Source_20_Text"><text:span text:style-name="T14">ruta_modelo = "/ruta/</text:span></text:span><text:span text:style-name="Source_20_Text"><text:span text:style-name="T47">mejor_pipeline_rf_sin_escalar.joblib</text:span></text:span><text:span text:style-name="Source_20_Text"><text:span text:style-name="T14">"</text:span></text:span></text:p>
        </text:list-item>
      </text:list>
      <text:p text:style-name="P49"><text:soft-page-break/>Durante las pruebas se utilizó el modelo Random Forest, debido a que <text:span text:style-name="T56">en ese momento </text:span>mostró el mejor desempeño para el problema. Sin embargo, puede utilizarse cualquiera de los modelos entrenados disponibles en <text:span text:style-name="T65">(modelos_ml_entrenados):</text:span></text:p>
      <text:p text:style-name="P91"><text:a xlink:type="simple" xlink:href="https://drive.google.com/drive/folders/1ugja-2RzRST-XzZYT2OBdEuyf8FElvK5?usp=sharing" text:style-name="Internet_20_link" text:visited-style-name="Visited_20_Internet_20_Link"><text:span text:style-name="T12">https://drive.google.com/drive/folders/1ugja-2RzRST-XzZYT2OBdEuyf8FElvK5?usp=sharing</text:span></text:a></text:p>
      <text:p text:style-name="P58"><text:span text:style-name="T63">Dentro de esta carpeta se encuentran:</text:span></text:p>
      <text:list xml:id="list246707199" text:style-name="L40">
        <text:list-item>
          <text:p text:style-name="P84"><text:span text:style-name="Source_20_Text"><text:span text:style-name="T60">mejor_pipeline_knn.joblib</text:span></text:span></text:p>
        </text:list-item>
      </text:list>
      <text:list xml:id="list1146767391" text:style-name="L46">
        <text:list-item>
          <text:p text:style-name="P92"><text:span text:style-name="Source_20_Text"><text:span text:style-name="T60">mejor_pipeline_reg_log.joblib</text:span></text:span></text:p>
        </text:list-item>
        <text:list-item>
          <text:p text:style-name="P92"><text:span text:style-name="Source_20_Text"><text:span text:style-name="T60">mejor_pipeline_svm.joblib</text:span></text:span></text:p>
        </text:list-item>
        <text:list-item>
          <text:p text:style-name="P92"><text:span text:style-name="Source_20_Text"><text:span text:style-name="T60">mejor_pipeline_rf_sin_escalar.joblib</text:span></text:span></text:p>
        </text:list-item>
        <text:list-item>
          <text:p text:style-name="P92"><text:span text:style-name="Source_20_Text"><text:span text:style-name="T61">mejor_mlp_checkpoint.pt</text:span></text:span></text:p>
        </text:list-item>
        <text:list-item>
          <text:p text:style-name="P92"><text:span text:style-name="Source_20_Text"><text:span text:style-name="T61">scaler_mlp.joblib</text:span></text:span></text:p>
        </text:list-item>
      </text:list>
      <text:p text:style-name="P91"><text:span text:style-name="Source_20_Text"><text:span text:style-name="T22">Cada .joblib corresponde a un notebook, dependiendo el modelo, para </text:span></text:span><text:span text:style-name="Source_20_Text"><text:span text:style-name="T20">el caso de</text:span></text:span><text:span text:style-name="Source_20_Text"><text:span text:style-name="T22">l modelo de</text:span></text:span><text:span text:style-name="Source_20_Text"><text:span text:style-name="T20"> redes neuronales </text:span></text:span><text:span text:style-name="Source_20_Text"><text:span text:style-name="T21">(MLP)</text:span></text:span><text:span text:style-name="Source_20_Text"><text:span text:style-name="T20">, se debe cargar </text:span></text:span></text:p>
      <text:list xml:id="list1909829330" text:style-name="L47">
        <text:list-item>
          <text:p text:style-name="P93"><text:span text:style-name="Source_20_Text"><text:span text:style-name="T20">mejor_mlp_checkpoint.pt</text:span></text:span></text:p>
        </text:list-item>
        <text:list-item>
          <text:p text:style-name="P93"><text:span text:style-name="Source_20_Text"><text:span text:style-name="T20">scaler_mlp.joblib</text:span></text:span></text:p>
        </text:list-item>
      </text:list>
      <text:h text:style-name="P5" text:outline-level="3">Nombre de las covariables utilizadas en el entrenamiento</text:h>
      <text:list xml:id="list4235005685" text:style-name="L21">
        <text:list-item>
          <text:p text:style-name="P65"><text:span text:style-name="Source_20_Text"><text:span text:style-name="T19">ru</text:span></text:span><text:span text:style-name="Source_20_Text"><text:span text:style-name="T14">ta_columnas_X_train = 'nombre_columnas_entrenamiento.pkl'</text:span></text:span></text:p>
        </text:list-item>
      </text:list>
      <text:p text:style-name="P18">El archivo se encuentra disponible en:</text:p>
      <text:p text:style-name="P18"><text:a xlink:type="simple" xlink:href="https://drive.google.com/file/d/1g31NN5twDT_nVx572sevZwVyX-Mo3jtu/view?usp=sharing" text:style-name="Internet_20_link" text:visited-style-name="Visited_20_Internet_20_Link">https://drive.google.com/file/d/1g31NN5twDT_nVx572sevZwVyX-Mo3jtu/view?usp=sharing</text:a></text:p>
      <text:p text:style-name="P36"><text:span text:style-name="Source_20_Text"><text:span text:style-name="T32"/></text:span></text:p>
      <text:h text:style-name="P30" text:outline-level="2"><text:span text:style-name="Source_20_Text"><text:span text:style-name="T37">6</text:span></text:span><text:span text:style-name="Source_20_Text"><text:span text:style-name="T38">. </text:span></text:span><text:span text:style-name="Source_20_Text"><text:span text:style-name="T37">Explicación del uso de las funciones contenidas en “funciones_auxiliares_predicciones.py”</text:span></text:span></text:h>
      <text:p text:style-name="P67"><text:span text:style-name="Strong_20_Emphasis">Notebook:</text:span></text:p>
      <text:list xml:id="list163503704250205" text:continue-list="list2629538528" text:style-name="L17">
        <text:list-item>
          <text:p text:style-name="P61"><text:span text:style-name="Source_20_Text"><text:span text:style-name="T54">como_funcionan_las_funciones</text:span></text:span><text:span text:style-name="Source_20_Text"><text:span text:style-name="T14">.ipynb</text:span></text:span></text:p>
        </text:list-item>
      </text:list>
      <text:p text:style-name="P18">Este notebook requiere los siguientes archivos:</text:p>
      <text:h text:style-name="P5" text:outline-level="3">Imagen utilizada para los ejemplos</text:h>
      <text:list xml:id="list903017786" text:style-name="L26">
        <text:list-item>
          <text:p text:style-name="P69"><text:span text:style-name="Source_20_Text"><text:span text:style-name="T14">rut_image = "image_x5_331.jpg"</text:span></text:span></text:p>
        </text:list-item>
      </text:list>
      <text:p text:style-name="P18">El archivo se encuentra disponible dentro del GitHub y se llama:</text:p>
      <text:p text:style-name="Text_20_body"><text:span text:style-name="Source_20_Text"><text:span text:style-name="T60">image_x5_331.jpg</text:span></text:span></text:p>
      <text:h text:style-name="Heading_20_3" text:outline-level="3"><text:span text:style-name="T1">Importación del archivo </text:span><text:span text:style-name="Source_20_Text"><text:span text:style-name="T14">.py</text:span></text:span><text:span text:style-name="T14"> </text:span><text:span text:style-name="T1">con las funciones auxiliares</text:span></text:h>
      <text:list xml:id="list328596905" text:style-name="L27">
        <text:list-item>
          <text:p text:style-name="P70"><text:span text:style-name="Source_20_Text"><text:span text:style-name="T14">from funciones_auxiliares_predicciones import *</text:span></text:span></text:p>
        </text:list-item>
      </text:list>
      <text:p text:style-name="P18">El archivo se encuentra disponible dentro del GitHub y se llama:</text:p>
      <text:p text:style-name="Text_20_body"><text:soft-page-break/><text:span text:style-name="Source_20_Text"><text:span text:style-name="T60">funciones_auxiliares_predicciones.py</text:span></text:span></text:p>
      <text:p text:style-name="P18">Este archivo contiene las siguientes funciones:</text:p>
      <text:list xml:id="list3717306715" text:style-name="L25">
        <text:list-item>
          <text:p text:style-name="P110"><text:span text:style-name="Source_20_Text"><text:span text:style-name="T14">seg_SLIC</text:span></text:span><text:span text:style-name="T14"> </text:span></text:p>
        </text:list-item>
        <text:list-item>
          <text:p text:style-name="P110"><text:span text:style-name="Source_20_Text"><text:span text:style-name="T14">extrac_features_sec</text:span></text:span><text:span text:style-name="T14"> </text:span></text:p>
        </text:list-item>
        <text:list-item>
          <text:p text:style-name="P110"><text:span text:style-name="Source_20_Text"><text:span text:style-name="T14">extrac_parallel_features</text:span></text:span><text:span text:style-name="T14"> </text:span></text:p>
        </text:list-item>
        <text:list-item>
          <text:p text:style-name="P110"><text:span text:style-name="Source_20_Text"><text:span text:style-name="T14">img_etiquetas_parallel</text:span></text:span><text:span text:style-name="T14"> </text:span></text:p>
        </text:list-item>
        <text:list-item>
          <text:p text:style-name="P110"><text:span text:style-name="Source_20_Text"><text:span text:style-name="T14">calcular_proporcion_pixeles</text:span></text:span><text:span text:style-name="T14"> </text:span></text:p>
        </text:list-item>
        <text:list-item>
          <text:p text:style-name="P68"><text:span text:style-name="Source_20_Text"><text:span text:style-name="T14">ver_superpixeles_categorias</text:span></text:span><text:span text:style-name="T14"> </text:span></text:p>
        </text:list-item>
      </text:list>
      <text:p text:style-name="Text_20_body"><text:span text:style-name="T1">Para utilizar cualquiera de estas funciones, es necesario importar previamente el archivo: </text:span><text:span text:style-name="Source_20_Text"><text:span text:style-name="T60">funciones_auxiliares_predicciones.py</text:span></text:span></text:p>
      <text:p text:style-name="P66"><text:span text:style-name="Source_20_Text"><text:span text:style-name="T49"/></text:span></text:p>
      <text:p text:style-name="P34"><text:span text:style-name="Source_20_Text"><text:span text:style-name="T50"/></text:span></text:p>
      <text:h text:style-name="P31" text:outline-level="2"><text:span text:style-name="Source_20_Text"><text:span text:style-name="T39">7</text:span></text:span><text:span text:style-name="Source_20_Text"><text:span text:style-name="T38">. </text:span></text:span><text:span text:style-name="Source_20_Text"><text:span text:style-name="T39">Clasificación automatica del conjunto de imágenes test_set_rgb, utilizando los diferentes modelos entrenados, considerando las 11 categorías </text:span></text:span></text:h>
      <text:p text:style-name="P71"><text:span text:style-name="T40">Notebooks:</text:span></text:p>
      <text:list xml:id="list1068760038" text:style-name="L32">
        <text:list-item>
          <text:p text:style-name="P73"><text:span text:style-name="T63">c</text:span><text:span text:style-name="Source_20_Text"><text:span text:style-name="T24">lasificacion_automatica_knn_test_set_rgb.ipynb</text:span></text:span></text:p>
        </text:list-item>
        <text:list-item>
          <text:p text:style-name="P73"><text:span text:style-name="Source_20_Text"><text:span text:style-name="T24">clasificacion_automatica_rl_test_set_rgb.ipynb</text:span></text:span></text:p>
        </text:list-item>
        <text:list-item>
          <text:p text:style-name="P73"><text:span text:style-name="Source_20_Text"><text:span text:style-name="T24">clasificacion_automatica_svm_test_set_rgb.ipynb</text:span></text:span></text:p>
        </text:list-item>
        <text:list-item>
          <text:p text:style-name="P73"><text:span text:style-name="Source_20_Text"><text:span text:style-name="T24">clasificacion_automatica_rf_test_set_rgb.ipynb</text:span></text:span></text:p>
        </text:list-item>
        <text:list-item>
          <text:p text:style-name="P72"><text:span text:style-name="Source_20_Text"><text:span text:style-name="T28">clasificacion_automatica_mlp_test_set_rgb.ipynb</text:span></text:span></text:p>
          <text:p text:style-name="P72"><text:span text:style-name="Source_20_Text"><text:span text:style-name="T28"/></text:span></text:p>
        </text:list-item>
      </text:list>
      <text:p text:style-name="P74">Est<text:span text:style-name="T66">os</text:span> notebook<text:span text:style-name="T66">s</text:span> requiere<text:span text:style-name="T66">n</text:span> los siguientes archivos:</text:p>
      <text:p text:style-name="P74"><text:span text:style-name="T40">Importación del archivo </text:span><text:span text:style-name="Source_20_Text"><text:span text:style-name="T23">.py</text:span></text:span><text:span text:style-name="T40"> con las funciones auxiliares</text:span></text:p>
      <text:list xml:id="list465642489" text:style-name="L34">
        <text:list-item>
          <text:p text:style-name="P75"><text:span text:style-name="Source_20_Text"><text:span text:style-name="T14">from funciones_auxiliares_predicciones import *</text:span></text:span></text:p>
        </text:list-item>
      </text:list>
      <text:p text:style-name="P74">El archivo se encuentra disponible dentro del GitHub y se llama:</text:p>
      <text:p text:style-name="P74"><text:span text:style-name="Source_20_Text"><text:span text:style-name="T62">funciones_auxiliares_predicciones.py</text:span></text:span></text:p>
      <text:p text:style-name="P74"><text:span text:style-name="T40">Ruta del conjunto de prueba</text:span></text:p>
      <text:list xml:id="list4035203792" text:style-name="L36">
        <text:list-item>
          <text:p text:style-name="P76"><text:span text:style-name="Source_20_Text"><text:span text:style-name="T14">carpeta_imgs = Path("/ruta/test_set_rgb/")</text:span></text:span></text:p>
        </text:list-item>
      </text:list>
      <text:p text:style-name="P74"><text:span text:style-name="T1">La carpeta correspondiente se encuentra en </text:span><text:span text:style-name="T3">(test_set_rgb)</text:span><text:span text:style-name="T1">:</text:span></text:p>
      <text:p text:style-name="P74"><text:a xlink:type="simple" xlink:href="https://drive.google.com/drive/folders/1K6Irsw0WHXWKRMfe4bm82g1zk5-7LHjs?usp=sharing" text:style-name="Internet_20_link" text:visited-style-name="Visited_20_Internet_20_Link"><text:span text:style-name="Source_20_Text"><text:span text:style-name="T14">https://drive.google.com/drive/folders/1K6Irsw0WHXWKRMfe4bm82g1zk5-7LHjs?usp=sharing</text:span></text:span></text:a></text:p>
      <text:p text:style-name="P74"><text:span text:style-name="T40">Archivo con el nombre y orden de las columnas utilizadas durante el entrenamiento</text:span></text:p>
      <text:list xml:id="list3302902129" text:style-name="L37">
        <text:list-item>
          <text:p text:style-name="P77"><text:span text:style-name="Source_20_Text"><text:span text:style-name="T14">ruta_columnas_X_train = Path("nombre_columnas_entrenamiento.pkl")</text:span></text:span></text:p>
        </text:list-item>
      </text:list>
      <text:p text:style-name="P89">El archivo se encuentra disponible dentro del GitHub y se llama:</text:p>
      <text:p text:style-name="P89"><text:span text:style-name="Source_20_Text"><text:span text:style-name="T60">nombre_columnas_entrenamiento.pkl</text:span></text:span></text:p>
      <text:p text:style-name="P78"><text:soft-page-break/>Modelos entrenados utilizados para las predicciones <text:span text:style-name="T67">(k-vecinos mas cercanos, regresión logística, maquinas de soporte vectorial, random forest)</text:span>:</text:p>
      <text:list xml:id="list163504701692360" text:continue-numbering="true" text:style-name="L37">
        <text:list-item>
          <text:p text:style-name="P79"><text:span text:style-name="Source_20_Text"><text:span text:style-name="T25">ruta_modelo = Path(“mejor_pipeline_knn.joblib”)</text:span></text:span></text:p>
        </text:list-item>
        <text:list-item>
          <text:p text:style-name="P79"><text:span text:style-name="Source_20_Text"><text:span text:style-name="T25">ruta_modelo = Path(“mejor_pipeline_reg_log.joblib”)</text:span></text:span></text:p>
        </text:list-item>
        <text:list-item>
          <text:p text:style-name="P79"><text:span text:style-name="Source_20_Text"><text:span text:style-name="T25">ruta_modelo = Path(“mejor_pipeline_svm.joblib”)</text:span></text:span></text:p>
        </text:list-item>
        <text:list-item>
          <text:p text:style-name="P79"><text:span text:style-name="Source_20_Text"><text:span text:style-name="T25">ruta_modelo = Path(“mejor_pipeline_rf_</text:span></text:span><text:span text:style-name="Source_20_Text"><text:span text:style-name="T27">sin_escalar</text:span></text:span><text:span text:style-name="Source_20_Text"><text:span text:style-name="T25">.joblib”)</text:span></text:span></text:p>
        </text:list-item>
      </text:list>
      <text:p text:style-name="P91"><text:span text:style-name="T64">Los </text:span><text:span text:style-name="T63">archivo</text:span><text:span text:style-name="T64">s</text:span><text:span text:style-name="T63"> se encuentra</text:span><text:span text:style-name="T64">n</text:span><text:span text:style-name="T63"> disponible</text:span><text:span text:style-name="T64">s</text:span><text:span text:style-name="T63"> </text:span><text:span text:style-name="T65">en (modelos_ml_entrenados):</text:span></text:p>
      <text:p text:style-name="P91"><text:a xlink:type="simple" xlink:href="https://drive.google.com/drive/folders/1ugja-2RzRST-XzZYT2OBdEuyf8FElvK5?usp=sharing" text:style-name="Internet_20_link" text:visited-style-name="Visited_20_Internet_20_Link"><text:span text:style-name="T12">https://drive.google.com/drive/folders/1ugja-2RzRST-XzZYT2OBdEuyf8FElvK5?usp=sharing</text:span></text:a></text:p>
      <text:p text:style-name="P58"><text:span text:style-name="T63">Dentro de esta carpeta se encuentran:</text:span></text:p>
      <text:list xml:id="list163503492903135" text:continue-list="list246707199" text:style-name="L40">
        <text:list-item>
          <text:p text:style-name="P83"><text:span text:style-name="Source_20_Text"><text:span text:style-name="T60">mejor_pipeline_knn.joblib</text:span></text:span></text:p>
        </text:list-item>
      </text:list>
      <text:list xml:id="list2621877342" text:style-name="L39">
        <text:list-item>
          <text:p text:style-name="P80"><text:span text:style-name="Source_20_Text"><text:span text:style-name="T60">mejor_pipeline_reg_log.joblib</text:span></text:span></text:p>
        </text:list-item>
        <text:list-item>
          <text:p text:style-name="P80"><text:span text:style-name="Source_20_Text"><text:span text:style-name="T60">mejor_pipeline_svm.joblib</text:span></text:span></text:p>
        </text:list-item>
        <text:list-item>
          <text:p text:style-name="P80"><text:span text:style-name="Source_20_Text"><text:span text:style-name="T60">mejor_pipeline_rf_sin_escalar.joblib</text:span></text:span></text:p>
        </text:list-item>
        <text:list-item>
          <text:p text:style-name="P81"><text:span text:style-name="Source_20_Text"><text:span text:style-name="T61">mejor_mlp_checkpoint.pt</text:span></text:span></text:p>
        </text:list-item>
        <text:list-item>
          <text:p text:style-name="P81"><text:span text:style-name="Source_20_Text"><text:span text:style-name="T61">scaler_mlp.joblib</text:span></text:span></text:p>
        </text:list-item>
      </text:list>
      <text:p text:style-name="P82"><text:span text:style-name="Source_20_Text"><text:span text:style-name="T20">Cada archivo corresponde al modelo utilizado en el notebook de clasificación automática correspondiente. Para el caso del modelo de redes neuronales (MLP), se deben cargar:</text:span></text:span></text:p>
      <text:list xml:id="list3623307896" text:style-name="L41">
        <text:list-item>
          <text:p text:style-name="P85"><text:span text:style-name="Source_20_Text"><text:span text:style-name="T20">ruta_ckpt = Path("mejor_mlp_checkpoint.pt")</text:span></text:span></text:p>
        </text:list-item>
        <text:list-item>
          <text:p text:style-name="P85"><text:span text:style-name="Source_20_Text"><text:span text:style-name="T20">ruta_scaler = Path("scaler_mlp.joblib")</text:span></text:span></text:p>
        </text:list-item>
      </text:list>
      <text:p text:style-name="Text_20_body">Donde:</text:p>
      <text:list xml:id="list1082012935" text:style-name="L45">
        <text:list-item>
          <text:p text:style-name="P90"><text:span text:style-name="Source_20_Text"><text:span text:style-name="T14">mejor_mlp_checkpoint.pt</text:span></text:span><text:span text:style-name="T14"> </text:span>contiene la arquitectura y pesos entrenados del modelo <text:span text:style-name="T1">MLP.</text:span></text:p>
        </text:list-item>
        <text:list-item>
          <text:p text:style-name="P90"><text:span text:style-name="Source_20_Text"><text:span text:style-name="T14">scaler_mlp.joblib</text:span></text:span> contiene el objeto <text:span text:style-name="Source_20_Text"><text:span text:style-name="T14">StandardScaler</text:span></text:span> utilizado durante el entrenamiento.</text:p>
        </text:list-item>
      </text:list>
      <text:p text:style-name="P78">Carpetas de salida: <text:span text:style-name="T63">donde se almacenan automáticamente los resultados generados durante la predicción.</text:span></text:p>
      <text:p text:style-name="Text_20_body">Dependiendo del modelo utilizado, se genera automáticamente una carpeta con el nombre:</text:p>
      <text:list xml:id="list961599017" text:style-name="L43">
        <text:list-item>
          <text:p text:style-name="P87"><text:span text:style-name="Source_20_Text"><text:span text:style-name="T14">predicciones_imgs_&lt;nombre_modelo&gt;</text:span></text:span></text:p>
        </text:list-item>
      </text:list>
      <text:p text:style-name="Text_20_body"><text:span text:style-name="Source_20_Text"><text:span text:style-name="T14"/></text:span></text:p>
      <text:p text:style-name="Text_20_body">Ejempl<text:span text:style-name="T68">os</text:span>:</text:p>
      <text:section text:style-name="Sect1" text:name="Sección1">
        <text:p text:style-name="P13"><text:bookmark text:name="code-block-viewer"/><text:span text:style-name="Source_20_Text"><text:span text:style-name="T14">carpeta_salida = Path("/home/victor/Documents/predicciones_imgs_rf")</text:span></text:span></text:p>
      </text:section>
      <text:section text:style-name="Sect1" text:name="Sección2">
        <text:p text:style-name="Preformatted_20_Text"><text:bookmark text:name="code-block-viewer1"/><text:span text:style-name="Source_20_Text"><text:span text:style-name="T14">carpeta_salida = Path("/home/victor/Documents/predicciones_imgs_knn")</text:span></text:span></text:p>
      </text:section>
      <text:p text:style-name="P41"/>
      <text:p text:style-name="P35"/>
      <text:h text:style-name="P32" text:outline-level="2"><text:soft-page-break/><text:span text:style-name="Strong_20_Emphasis"><text:span text:style-name="T18"/></text:span></text:h>
      <text:p text:style-name="P27"><text:span text:style-name="Strong_20_Emphasis"><text:span text:style-name="T18"/></text:span></text:p>
      <text:p text:style-name="P27"><text:span text:style-name="Source_20_Text"><text:span text:style-name="Strong_20_Emphasis"><text:span text:style-name="T18">Nota:</text:span></text:span></text:span><text:span text:style-name="Source_20_Text"><text:span text:style-name="T18"> Los archivos de salida generados por cada script se guardan, por defecto, en la misma carpeta desde donde se cargan los datos de entrada. En caso de utilizar una carpeta diferente, esta se especifica explícitamente en la descripción correspondiente.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Mona Sans VF" svg:font-family="'Mona Sans VF', apple-system, BlinkMacSystemFont, 'Segoe UI', 'Noto Sans', Helvetica, Arial, sans-serif, 'Apple Color Emoji', 'Segoe UI Emoji'"/>
    <style:font-face style:name="system-ui" svg:font-family="system-ui, apple-system, blinkmacsystemfont,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5-11T02:16:06.572747217</meta:creation-date>
    <dc:date>2026-05-12T03:38:37.093635894</dc:date>
    <meta:editing-duration>PT6H27M25S</meta:editing-duration>
    <meta:editing-cycles>8</meta:editing-cycles>
    <meta:generator>LibreOffice/6.4.7.2$Linux_X86_64 LibreOffice_project/40$Build-2</meta:generator>
    <meta:document-statistic meta:table-count="0" meta:image-count="0" meta:object-count="0" meta:page-count="8" meta:paragraph-count="197" meta:word-count="1187" meta:character-count="11535" meta:non-whitespace-character-count="10592"/>
  </office:meta>
</office:document-meta>
</file>